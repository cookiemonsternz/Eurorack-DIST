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family-generic="roman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ffffff" style:text-align-source="fix" style:repeat-content="false" fo:border-left="none" fo:border-right="none" fo:border-top="0.74pt solid #ffffff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erif1"/>
    </style:style>
    <style:style style:name="ce3" style:family="table-cell" style:parent-style-name="Default">
      <style:text-properties style:font-name="Liberation Serif2"/>
    </style:style>
    <style:style style:name="ce14" style:family="table-cell" style:parent-style-name="Default">
      <style:table-cell-properties fo:border-bottom="none" fo:border-left="none" fo:border-right="none" fo:border-top="0.74pt solid #ffffff"/>
    </style:style>
    <style:style style:name="ce10" style:family="table-cell" style:parent-style-name="Default" style:data-style-name="N104"/>
    <style:style style:name="ce4" style:family="table-cell" style:parent-style-name="Default" style:data-style-name="N12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8"/>
    <style:style style:name="ce6" style:family="table-cell" style:parent-style-name="Default" style:data-style-name="N1012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120">
      <style:table-cell-properties fo:wrap-option="wrap"/>
    </style:style>
    <style:style style:name="ce8" style:family="table-cell" style:parent-style-name="Default" style:data-style-name="N120"/>
    <style:style style:name="ce9" style:family="table-cell" style:parent-style-name="Default" style:data-style-name="N10120"/>
    <style:style style:name="ce22" style:family="table-cell" style:parent-style-name="Default" style:data-style-name="N104">
      <style:table-cell-properties fo:border-bottom="none" fo:border-left="none" fo:border-right="none" fo:border-top="0.74pt solid #ffffff"/>
    </style:style>
    <style:style style:name="T1" style:family="text">
      <style:text-properties style:font-name="Liberation Serif2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4"/>
        <table:table-column table:style-name="co2" table:default-cell-style-name="ce8"/>
        <table:table-column table:style-name="co2" table:default-cell-style-name="ce10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eede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ot / Min Amount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Net</text:p>
          </table:table-cell>
          <table:table-cell table:style-name="Default" office:value-type="string" calcext:value-type="string">
            <text:p>Running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Capacitors</text:p>
          </table:table-cell>
          <table:covered-table-cell table:number-columns-repeated="5"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1n Cap, 08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47657-CL21B102KBCNNNC/C46653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112" calcext:value-type="currency">
            <text:p>$0.0112</text:p>
          </table:table-cell>
          <table:table-cell table:formula="of:=[.C3]*[.G3]" office:value-type="currency" office:currency="NZD" office:value="0.0672" calcext:value-type="currency">
            <text:p>$0.0672</text:p>
          </table:table-cell>
          <table:table-cell table:formula="of:=SUM([.H$3:.H3])" office:value-type="currency" office:currency="NZD" office:value="0.0672" calcext:value-type="currency">
            <text:p>$0.07</text:p>
          </table:table-cell>
        </table:table-row>
        <table:table-row table:style-name="ro1">
          <table:table-cell office:value-type="string" calcext:value-type="string">
            <text:p>4.7n Cap, 08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096-0805B472K500NT/C1744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66" calcext:value-type="currency">
            <text:p>$0.0066</text:p>
          </table:table-cell>
          <table:table-cell table:formula="of:=[.C4]*[.G4]" office:value-type="currency" office:currency="NZD" office:value="0.0198" calcext:value-type="currency">
            <text:p>$0.0198</text:p>
          </table:table-cell>
          <table:table-cell table:formula="of:=SUM([.H$3:.H4])" office:value-type="currency" office:currency="NZD" office:value="0.087" calcext:value-type="currency">
            <text:p>$0.09</text:p>
          </table:table-cell>
        </table:table-row>
        <table:table-row table:style-name="ro1">
          <table:table-cell office:value-type="string" calcext:value-type="string">
            <text:p>10n Cap, 08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062-CL21B103KBANNNC/C1710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82" calcext:value-type="currency">
            <text:p>$0.0082</text:p>
          </table:table-cell>
          <table:table-cell table:formula="of:=[.C5]*[.G5]" office:value-type="currency" office:currency="NZD" office:value="0.0164" calcext:value-type="currency">
            <text:p>$0.0164</text:p>
          </table:table-cell>
          <table:table-cell table:formula="of:=SUM([.H$3:.H5])" office:value-type="currency" office:currency="NZD" office:value="0.1034" calcext:value-type="currency">
            <text:p>$0.10</text:p>
          </table:table-cell>
        </table:table-row>
        <table:table-row table:style-name="ro1">
          <table:table-cell office:value-type="string" calcext:value-type="string">
            <text:p>22n Cap, 08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081-CL21B223KBANNNC/C1729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97" calcext:value-type="currency">
            <text:p>$0.0097</text:p>
          </table:table-cell>
          <table:table-cell table:formula="of:=[.C6]*[.G6]" office:value-type="currency" office:currency="NZD" office:value="0.0194" calcext:value-type="currency">
            <text:p>$0.0194</text:p>
          </table:table-cell>
          <table:table-cell table:formula="of:=SUM([.H$3:.H6])" office:value-type="currency" office:currency="NZD" office:value="0.1228" calcext:value-type="currency">
            <text:p>$0.12</text:p>
          </table:table-cell>
        </table:table-row>
        <table:table-row table:style-name="ro1">
          <table:table-cell office:value-type="string" calcext:value-type="string">
            <text:p>100n Cap, 080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YAGEO-CC0805KRX7R9BB104/C49678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66" calcext:value-type="currency">
            <text:p>$0.0066</text:p>
          </table:table-cell>
          <table:table-cell table:formula="of:=[.C7]*[.G7]" office:value-type="currency" office:currency="NZD" office:value="0.1254" calcext:value-type="currency">
            <text:p>$0.1254</text:p>
          </table:table-cell>
          <table:table-cell table:formula="of:=SUM([.H$3:.H7])" office:value-type="currency" office:currency="NZD" office:value="0.2482" calcext:value-type="currency">
            <text:p>$0.25</text:p>
          </table:table-cell>
        </table:table-row>
        <table:table-row table:style-name="ro1">
          <table:table-cell office:value-type="string" calcext:value-type="string">
            <text:p>220n Cap, 080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5810-CL21B224KBFNNNE/C5378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122" calcext:value-type="currency">
            <text:p>$0.0122</text:p>
          </table:table-cell>
          <table:table-cell table:formula="of:=[.C8]*[.G8]" office:value-type="currency" office:currency="NZD" office:value="0.1586" calcext:value-type="currency">
            <text:p>$0.1586</text:p>
          </table:table-cell>
          <table:table-cell table:formula="of:=SUM([.H$3:.H8])" office:value-type="currency" office:currency="NZD" office:value="0.4068" calcext:value-type="currency">
            <text:p>$0.41</text:p>
          </table:table-cell>
        </table:table-row>
        <table:table-row table:style-name="ro1">
          <table:table-cell office:value-type="string" calcext:value-type="string">
            <text:p>1u Cap, 08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9074-CL21B105KBFNNNE/C28323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165" calcext:value-type="currency">
            <text:p>$0.0165</text:p>
          </table:table-cell>
          <table:table-cell table:formula="of:=[.C9]*[.G9]" office:value-type="currency" office:currency="NZD" office:value="0.0165" calcext:value-type="currency">
            <text:p>$0.0165</text:p>
          </table:table-cell>
          <table:table-cell table:formula="of:=SUM([.H$3:.H9])" office:value-type="currency" office:currency="NZD" office:value="0.4233" calcext:value-type="currency">
            <text:p>$0.42</text:p>
          </table:table-cell>
        </table:table-row>
        <table:table-row table:style-name="ro1">
          <table:table-cell office:value-type="string" calcext:value-type="string">
            <text:p>1u Electrolytic Cap, P1.5xD4.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216323.html?spm=wm.fly.bg.2.xh___wm.sy.dhl.mly.12-0-1&amp;lcsc_vid=QgdcVwJXRQJWBFFSFgMKBQVWEgAMVVEFTgQNA1ZXFlkxVlNeR1JeV1RVRlFaVTtW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0185" calcext:value-type="currency">
            <text:p>$0.0185</text:p>
          </table:table-cell>
          <table:table-cell table:formula="of:=[.C10]*[.G10]" office:value-type="currency" office:currency="NZD" office:value="0" calcext:value-type="currency">
            <text:p>$0.0000</text:p>
          </table:table-cell>
          <table:table-cell table:formula="of:=SUM([.H$3:.H10])" office:value-type="currency" office:currency="NZD" office:value="0.4233" calcext:value-type="currency">
            <text:p>$0.42</text:p>
          </table:table-cell>
        </table:table-row>
        <table:table-row table:style-name="ro1">
          <table:table-cell office:value-type="string" calcext:value-type="string">
            <text:p>2.2u Electrolytic Cap, P1.5xD4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43343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0151" calcext:value-type="currency">
            <text:p>$0.0151</text:p>
          </table:table-cell>
          <table:table-cell table:formula="of:=[.C11]*[.G11]" office:value-type="currency" office:currency="NZD" office:value="0" calcext:value-type="currency">
            <text:p>$0.0000</text:p>
          </table:table-cell>
          <table:table-cell table:formula="of:=SUM([.H$3:.H11])" office:value-type="currency" office:currency="NZD" office:value="0.4233" calcext:value-type="currency">
            <text:p>$0.42</text:p>
          </table:table-cell>
        </table:table-row>
        <table:table-row table:style-name="ro1">
          <table:table-cell office:value-type="string" calcext:value-type="string">
            <text:p>4.7u Electrolytic Cap, P1.5xD4.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2873979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0114" calcext:value-type="currency">
            <text:p>$0.0114</text:p>
          </table:table-cell>
          <table:table-cell table:formula="of:=[.C12]*[.G12]" office:value-type="currency" office:currency="NZD" office:value="0" calcext:value-type="currency">
            <text:p>$0.0000</text:p>
          </table:table-cell>
          <table:table-cell table:formula="of:=SUM([.H$3:.H12])" office:value-type="currency" office:currency="NZD" office:value="0.4233" calcext:value-type="currency">
            <text:p>$0.42</text:p>
          </table:table-cell>
        </table:table-row>
        <table:table-row table:style-name="ro1">
          <table:table-cell office:value-type="string" calcext:value-type="string">
            <text:p>10u Electrolytic Cap, P1.5xD4.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503219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0143" calcext:value-type="currency">
            <text:p>$0.0143</text:p>
          </table:table-cell>
          <table:table-cell table:formula="of:=[.C13]*[.G13]" office:value-type="currency" office:currency="NZD" office:value="0" calcext:value-type="currency">
            <text:p>$0.0000</text:p>
          </table:table-cell>
          <table:table-cell table:formula="of:=SUM([.H$3:.H13])" office:value-type="currency" office:currency="NZD" office:value="0.4233" calcext:value-type="currency">
            <text:p>$0.42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Resistors</text:p>
          </table:table-cell>
          <table:covered-table-cell table:number-columns-repeated="5"/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>
            <text:p>47<text:span text:style-name="T1">Ω Resistor, 0805</text:span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402-0805W8F470JT5E/C17714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NZD" office:value="0.0015" calcext:value-type="currency">
            <text:p>$0.002</text:p>
          </table:table-cell>
          <table:table-cell table:formula="of:=[.C15]*[.G15]" office:value-type="currency" office:currency="NZD" office:value="0.003" calcext:value-type="currency">
            <text:p>$0.0030</text:p>
          </table:table-cell>
          <table:table-cell table:formula="of:=SUM([.H$3:.H15])" office:value-type="currency" office:currency="NZD" office:value="0.4263" calcext:value-type="currency">
            <text:p>$0.43</text:p>
          </table:table-cell>
        </table:table-row>
        <table:table-row table:style-name="ro1">
          <table:table-cell table:style-name="ce3" office:value-type="string" calcext:value-type="string">
            <text:p>150Ω Resistor, 08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159-0805W8F1500T5E/C17471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6" calcext:value-type="currency">
            <text:p>$0.0016</text:p>
          </table:table-cell>
          <table:table-cell table:formula="of:=[.C16]*[.G16]" office:value-type="currency" office:currency="NZD" office:value="0.0032" calcext:value-type="currency">
            <text:p>$0.0032</text:p>
          </table:table-cell>
          <table:table-cell table:formula="of:=SUM([.H$3:.H16])" office:value-type="currency" office:currency="NZD" office:value="0.4295" calcext:value-type="currency">
            <text:p>$0.43</text:p>
          </table:table-cell>
        </table:table-row>
        <table:table-row table:style-name="ro1">
          <table:table-cell table:style-name="ce3" office:value-type="string" calcext:value-type="string">
            <text:p>560Ω Resistor, 08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9388-0805W8F5600T5E/C28636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9" calcext:value-type="currency">
            <text:p>$0.0019</text:p>
          </table:table-cell>
          <table:table-cell table:formula="of:=[.C17]*[.G17]" office:value-type="currency" office:currency="NZD" office:value="0.0095" calcext:value-type="currency">
            <text:p>$0.0095</text:p>
          </table:table-cell>
          <table:table-cell table:formula="of:=SUM([.H$3:.H17])" office:value-type="currency" office:currency="NZD" office:value="0.439" calcext:value-type="currency">
            <text:p>$0.44</text:p>
          </table:table-cell>
        </table:table-row>
        <table:table-row table:style-name="ro1">
          <table:table-cell table:style-name="ce3" office:value-type="string" calcext:value-type="string">
            <text:p>1kΩ Resistor, 08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201-0805W8F1001T5E/C17513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NZD" office:value="0.0021" calcext:value-type="currency">
            <text:p>$0.0021</text:p>
          </table:table-cell>
          <table:table-cell table:formula="of:=[.C18]*[.G18]" office:value-type="currency" office:currency="NZD" office:value="0.021" calcext:value-type="currency">
            <text:p>$0.0210</text:p>
          </table:table-cell>
          <table:table-cell table:formula="of:=SUM([.H$3:.H18])" office:value-type="currency" office:currency="NZD" office:value="0.46" calcext:value-type="currency">
            <text:p>$0.46</text:p>
          </table:table-cell>
        </table:table-row>
        <table:table-row table:style-name="ro1">
          <table:table-cell table:style-name="ce3" office:value-type="string" calcext:value-type="string">
            <text:p>1.5kΩ Resistor, 08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4717-0805W8F1501T5E/C4310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NZD" office:value="0.0015" calcext:value-type="currency">
            <text:p>$0.0015</text:p>
          </table:table-cell>
          <table:table-cell table:formula="of:=[.C19]*[.G19]" office:value-type="currency" office:currency="NZD" office:value="0.0015" calcext:value-type="currency">
            <text:p>$0.0015</text:p>
          </table:table-cell>
          <table:table-cell table:formula="of:=SUM([.H$3:.H19])" office:value-type="currency" office:currency="NZD" office:value="0.4615" calcext:value-type="currency">
            <text:p>$0.46</text:p>
          </table:table-cell>
        </table:table-row>
        <table:table-row table:style-name="ro1">
          <table:table-cell table:style-name="ce3" office:value-type="string" calcext:value-type="string">
            <text:p>2.2kΩ Resistor, 08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208-0805W8F2201T5E/C17520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5" calcext:value-type="currency">
            <text:p>$0.0015</text:p>
          </table:table-cell>
          <table:table-cell table:formula="of:=[.C20]*[.G20]" office:value-type="currency" office:currency="NZD" office:value="0.003" calcext:value-type="currency">
            <text:p>$0.0030</text:p>
          </table:table-cell>
          <table:table-cell table:formula="of:=SUM([.H$3:.H20])" office:value-type="currency" office:currency="NZD" office:value="0.4645" calcext:value-type="currency">
            <text:p>$0.46</text:p>
          </table:table-cell>
        </table:table-row>
        <table:table-row table:style-name="ro1">
          <table:table-cell table:style-name="ce3" office:value-type="string" calcext:value-type="string">
            <text:p>4.7kΩ Resistor, 08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361-0805W8F4701T5E/C17673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6" calcext:value-type="currency">
            <text:p>$0.0016</text:p>
          </table:table-cell>
          <table:table-cell table:formula="of:=[.C21]*[.G21]" office:value-type="currency" office:currency="NZD" office:value="0.0016" calcext:value-type="currency">
            <text:p>$0.0016</text:p>
          </table:table-cell>
          <table:table-cell table:formula="of:=SUM([.H$3:.H21])" office:value-type="currency" office:currency="NZD" office:value="0.4661" calcext:value-type="currency">
            <text:p>$0.47</text:p>
          </table:table-cell>
        </table:table-row>
        <table:table-row table:style-name="ro1">
          <table:table-cell table:style-name="ce3" office:value-type="string" calcext:value-type="string">
            <text:p>6.8kΩ Resistor, 08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460-0805W8F6801T5E/C17772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7" calcext:value-type="currency">
            <text:p>$0.0017</text:p>
          </table:table-cell>
          <table:table-cell table:formula="of:=[.C22]*[.G22]" office:value-type="currency" office:currency="NZD" office:value="0.0017" calcext:value-type="currency">
            <text:p>$0.0017</text:p>
          </table:table-cell>
          <table:table-cell table:formula="of:=SUM([.H$3:.H22])" office:value-type="currency" office:currency="NZD" office:value="0.4678" calcext:value-type="currency">
            <text:p>$0.47</text:p>
          </table:table-cell>
        </table:table-row>
        <table:table-row table:style-name="ro1">
          <table:table-cell table:style-name="ce3" office:value-type="string" calcext:value-type="string">
            <text:p>10kΩ Resistor, 08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102-0805W8F1002T5E/C17414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NZD" office:value="0.002" calcext:value-type="currency">
            <text:p>$0.0020</text:p>
          </table:table-cell>
          <table:table-cell table:formula="of:=[.C23]*[.G23]" office:value-type="currency" office:currency="NZD" office:value="0.02" calcext:value-type="currency">
            <text:p>$0.0200</text:p>
          </table:table-cell>
          <table:table-cell table:formula="of:=SUM([.H$3:.H23])" office:value-type="currency" office:currency="NZD" office:value="0.4878" calcext:value-type="currency">
            <text:p>$0.49</text:p>
          </table:table-cell>
        </table:table-row>
        <table:table-row table:style-name="ro1">
          <table:table-cell table:style-name="ce3" office:value-type="string" calcext:value-type="string">
            <text:p>22kΩ Resistor, 08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248-0805W8F2202T5E/C17560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NZD" office:value="0.0027" calcext:value-type="currency">
            <text:p>$0.0027</text:p>
          </table:table-cell>
          <table:table-cell table:formula="of:=[.C24]*[.G24]" office:value-type="currency" office:currency="NZD" office:value="0.0054" calcext:value-type="currency">
            <text:p>$0.0054</text:p>
          </table:table-cell>
          <table:table-cell table:formula="of:=SUM([.H$3:.H24])" office:value-type="currency" office:currency="NZD" office:value="0.4932" calcext:value-type="currency">
            <text:p>$0.49</text:p>
          </table:table-cell>
        </table:table-row>
        <table:table-row table:style-name="ro1">
          <table:table-cell table:style-name="ce3" office:value-type="string" calcext:value-type="string">
            <text:p>39kΩ Resistor, 08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6569-0805W8F3902T5E/C25826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8" calcext:value-type="currency">
            <text:p>$0.0018</text:p>
          </table:table-cell>
          <table:table-cell table:formula="of:=[.C25]*[.G25]" office:value-type="currency" office:currency="NZD" office:value="0.0072" calcext:value-type="currency">
            <text:p>$0.0072</text:p>
          </table:table-cell>
          <table:table-cell table:formula="of:=SUM([.H$3:.H25])" office:value-type="currency" office:currency="NZD" office:value="0.5004" calcext:value-type="currency">
            <text:p>$0.50</text:p>
          </table:table-cell>
        </table:table-row>
        <table:table-row table:style-name="ro1">
          <table:table-cell table:style-name="ce3" office:value-type="string" calcext:value-type="string">
            <text:p>100kΩ Resistor, 080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60838-0805W8F1003T5E/C149504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2" calcext:value-type="currency">
            <text:p>$0.0020</text:p>
          </table:table-cell>
          <table:table-cell table:formula="of:=[.C26]*[.G26]" office:value-type="currency" office:currency="NZD" office:value="0.026" calcext:value-type="currency">
            <text:p>$0.0260</text:p>
          </table:table-cell>
          <table:table-cell table:formula="of:=SUM([.H$3:.H26])" office:value-type="currency" office:currency="NZD" office:value="0.5264" calcext:value-type="currency">
            <text:p>$0.53</text:p>
          </table:table-cell>
        </table:table-row>
        <table:table-row table:style-name="ro1">
          <table:table-cell table:style-name="ce3" office:value-type="string" calcext:value-type="string">
            <text:p>150kΩ Resistor, 08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158-0805W8F1503T5E/C17470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8" calcext:value-type="currency">
            <text:p>$0.0018</text:p>
          </table:table-cell>
          <table:table-cell table:formula="of:=[.C27]*[.G27]" office:value-type="currency" office:currency="NZD" office:value="0.0018" calcext:value-type="currency">
            <text:p>$0.0018</text:p>
          </table:table-cell>
          <table:table-cell table:formula="of:=SUM([.H$3:.H27])" office:value-type="currency" office:currency="NZD" office:value="0.5282" calcext:value-type="currency">
            <text:p>$0.53</text:p>
          </table:table-cell>
        </table:table-row>
        <table:table-row table:style-name="ro1">
          <table:table-cell table:style-name="ce3" office:value-type="string" calcext:value-type="string">
            <text:p>200kΩ Resistor, 08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227-0805W8F2003T5E/C17539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21" calcext:value-type="currency">
            <text:p>$0.0021</text:p>
          </table:table-cell>
          <table:table-cell table:formula="of:=[.C28]*[.G28]" office:value-type="currency" office:currency="NZD" office:value="0.0084" calcext:value-type="currency">
            <text:p>$0.0084</text:p>
          </table:table-cell>
          <table:table-cell table:formula="of:=SUM([.H$3:.H28])" office:value-type="currency" office:currency="NZD" office:value="0.5366" calcext:value-type="currency">
            <text:p>$0.54</text:p>
          </table:table-cell>
        </table:table-row>
        <table:table-row table:style-name="ro1">
          <table:table-cell table:style-name="ce3" office:value-type="string" calcext:value-type="string">
            <text:p>220kΩ Resistor, 08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244-0805W8F2203T5E/C17556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7" calcext:value-type="currency">
            <text:p>$0.0017</text:p>
          </table:table-cell>
          <table:table-cell table:formula="of:=[.C29]*[.G29]" office:value-type="currency" office:currency="NZD" office:value="0.0034" calcext:value-type="currency">
            <text:p>$0.0034</text:p>
          </table:table-cell>
          <table:table-cell table:formula="of:=SUM([.H$3:.H29])" office:value-type="currency" office:currency="NZD" office:value="0.54" calcext:value-type="currency">
            <text:p>$0.54</text:p>
          </table:table-cell>
        </table:table-row>
        <table:table-row table:style-name="ro1">
          <table:table-cell table:style-name="ce3" office:value-type="string" calcext:value-type="string">
            <text:p>470kΩ Resistor, 08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397-0805W8F4703T5E/C17709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5" calcext:value-type="currency">
            <text:p>$0.0015</text:p>
          </table:table-cell>
          <table:table-cell table:formula="of:=[.C30]*[.G30]" office:value-type="currency" office:currency="NZD" office:value="0.0045" calcext:value-type="currency">
            <text:p>$0.0045</text:p>
          </table:table-cell>
          <table:table-cell table:formula="of:=SUM([.H$3:.H30])" office:value-type="currency" office:currency="NZD" office:value="0.5445" calcext:value-type="currency">
            <text:p>$0.54</text:p>
          </table:table-cell>
        </table:table-row>
        <table:table-row table:style-name="ro1">
          <table:table-cell table:style-name="ce3" office:value-type="string" calcext:value-type="string">
            <text:p>1MΩ Resistor, 08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202-0805W8F1004T5E/C17514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" calcext:value-type="currency">
            <text:p>$0.0010</text:p>
          </table:table-cell>
          <table:table-cell table:formula="of:=[.C31]*[.G31]" office:value-type="currency" office:currency="NZD" office:value="0.001" calcext:value-type="currency">
            <text:p>$0.0010</text:p>
          </table:table-cell>
          <table:table-cell table:formula="of:=SUM([.H$3:.H31])" office:value-type="currency" office:currency="NZD" office:value="0.5455" calcext:value-type="currency">
            <text:p>$0.55</text:p>
          </table:table-cell>
        </table:table-row>
        <table:table-row table:style-name="ro1">
          <table:table-cell table:style-name="ce3" office:value-type="string" calcext:value-type="string">
            <text:p>2.2MΩ Resistor, 08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6856-0805W8F2204T5E/C26113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33" calcext:value-type="currency">
            <text:p>$0.0033</text:p>
          </table:table-cell>
          <table:table-cell table:formula="of:=[.C32]*[.G32]" office:value-type="currency" office:currency="NZD" office:value="0.0033" calcext:value-type="currency">
            <text:p>$0.0033</text:p>
          </table:table-cell>
          <table:table-cell table:formula="of:=SUM([.H$3:.H32])" office:value-type="currency" office:currency="NZD" office:value="0.5488" calcext:value-type="currency">
            <text:p>$0.55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Diodes</text:p>
          </table:table-cell>
          <table:covered-table-cell table:number-columns-repeated="5"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1N4148WS, SOD-3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485-1N4148WS/C2128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92" calcext:value-type="currency">
            <text:p>$0.0092</text:p>
          </table:table-cell>
          <table:table-cell table:formula="of:=[.C34]*[.G34]" office:value-type="currency" office:currency="NZD" office:value="0.1104" calcext:value-type="currency">
            <text:p>$0.1104</text:p>
          </table:table-cell>
          <table:table-cell table:formula="of:=SUM([.H$3:.H34])" office:value-type="currency" office:currency="NZD" office:value="0.6592" calcext:value-type="currency">
            <text:p>$0.66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Other Components</text:p>
          </table:table-cell>
          <table:covered-table-cell table:number-columns-repeated="5"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TL072CD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STMicroelectronics-TL072CDT/C6961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NZD" office:value="0.157" calcext:value-type="currency">
            <text:p>$0.1570</text:p>
          </table:table-cell>
          <table:table-cell table:formula="of:=[.C36]*[.G36]" office:value-type="currency" office:currency="NZD" office:value="1.099" calcext:value-type="currency">
            <text:p>$1.0990</text:p>
          </table:table-cell>
          <table:table-cell table:formula="of:=SUM([.H$3:.H36])" office:value-type="currency" office:currency="NZD" office:value="1.7582" calcext:value-type="currency">
            <text:p>$1.76</text:p>
          </table:table-cell>
        </table:table-row>
        <table:table-row table:style-name="ro1">
          <table:table-cell office:value-type="string" calcext:value-type="string">
            <text:p>100kΩ Potentiometer, ‘RK09K’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7278123055.html</text:p>
          </table:table-cell>
          <table:table-cell office:value-type="float" office:value="5" calcext:value-type="float">
            <text:p>5</text:p>
          </table:table-cell>
          <table:table-cell table:style-name="ce8" table:formula="of:=1.04/5" office:value-type="currency" office:currency="NZD" office:value="0.208" calcext:value-type="currency">
            <text:p>$0.2080</text:p>
          </table:table-cell>
          <table:table-cell office:value-type="currency" office:currency="NZD" office:value="3.12" calcext:value-type="currency">
            <text:p>$3.1200</text:p>
          </table:table-cell>
          <table:table-cell table:formula="of:=SUM([.H$3:.H37])" office:value-type="currency" office:currency="NZD" office:value="4.8782" calcext:value-type="currency">
            <text:p>$4.88</text:p>
          </table:table-cell>
        </table:table-row>
        <table:table-row table:style-name="ro1">
          <table:table-cell office:value-type="string" calcext:value-type="string">
            <text:p>SPDT Switc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5370002265.html</text:p>
          </table:table-cell>
          <table:table-cell office:value-type="float" office:value="5" calcext:value-type="float">
            <text:p>5</text:p>
          </table:table-cell>
          <table:table-cell table:style-name="ce9" table:formula="of:=4.26/5" office:value-type="currency" office:currency="NZD" office:value="0.852" calcext:value-type="currency">
            <text:p>$0.8520</text:p>
          </table:table-cell>
          <table:table-cell office:value-type="currency" office:currency="NZD" office:value="4.26" calcext:value-type="currency">
            <text:p>$4.2600</text:p>
          </table:table-cell>
          <table:table-cell table:formula="of:=SUM([.H$3:.H38])" office:value-type="currency" office:currency="NZD" office:value="9.1382" calcext:value-type="currency">
            <text:p>$9.14</text:p>
          </table:table-cell>
        </table:table-row>
        <table:table-row table:style-name="ro1">
          <table:table-cell office:value-type="string" calcext:value-type="string">
            <text:p>PJ301M-12 Audio Jac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4864182675.html</text:p>
          </table:table-cell>
          <table:table-cell office:value-type="float" office:value="10" calcext:value-type="float">
            <text:p>10</text:p>
          </table:table-cell>
          <table:table-cell table:style-name="ce8" office:value-type="currency" office:currency="NZD" office:value="0.444" calcext:value-type="currency">
            <text:p>$0.4440</text:p>
          </table:table-cell>
          <table:table-cell office:value-type="currency" office:currency="NZD" office:value="4.4" calcext:value-type="currency">
            <text:p>$4.4000</text:p>
          </table:table-cell>
          <table:table-cell table:formula="of:=SUM([.H$3:.H39])" office:value-type="currency" office:currency="NZD" office:value="13.5382" calcext:value-type="currency">
            <text:p>$13.54</text:p>
          </table:table-cell>
        </table:table-row>
        <table:table-row table:style-name="ro1">
          <table:table-cell office:value-type="string" calcext:value-type="string">
            <text:p>2x08 IDC Connec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7430313.html</text:p>
          </table:table-cell>
          <table:table-cell office:value-type="float" office:value="5" calcext:value-type="float">
            <text:p>5</text:p>
          </table:table-cell>
          <table:table-cell table:style-name="ce8" office:value-type="currency" office:currency="NZD" office:value="0.0993" calcext:value-type="currency">
            <text:p>$0.0993</text:p>
          </table:table-cell>
          <table:table-cell table:formula="of:=[.C40]*[.G40]" office:value-type="currency" office:currency="NZD" office:value="0" calcext:value-type="currency">
            <text:p>$0.0000</text:p>
          </table:table-cell>
          <table:table-cell table:formula="of:=SUM([.H$3:.H40])" office:value-type="currency" office:currency="NZD" office:value="13.5382" calcext:value-type="currency">
            <text:p>$13.54</text:p>
          </table:table-cell>
        </table:table-row>
        <table:table-row table:style-name="ro1">
          <table:table-cell office:value-type="string" calcext:value-type="string">
            <text:p>100kΩ Trimpot, ‘3362p’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10523079544.html</text:p>
          </table:table-cell>
          <table:table-cell office:value-type="float" office:value="10" calcext:value-type="float">
            <text:p>10</text:p>
          </table:table-cell>
          <table:table-cell table:style-name="ce8" office:value-type="currency" office:currency="NZD" office:value="0.448" calcext:value-type="currency">
            <text:p>$0.4480</text:p>
          </table:table-cell>
          <table:table-cell office:value-type="currency" office:currency="NZD" office:value="4.48" calcext:value-type="currency">
            <text:p>$4.4800</text:p>
          </table:table-cell>
          <table:table-cell table:formula="of:=SUM([.H$3:.H41])" office:value-type="currency" office:currency="NZD" office:value="18.0182" calcext:value-type="currency">
            <text:p>$18.02</text:p>
          </table:table-cell>
        </table:table-row>
        <table:table-row table:style-name="ro1">
          <table:table-cell office:value-type="string" calcext:value-type="string">
            <text:p>BC547B NPN BJ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713613.html</text:p>
          </table:table-cell>
          <table:table-cell office:value-type="float" office:value="10" calcext:value-type="float">
            <text:p>10</text:p>
          </table:table-cell>
          <table:table-cell table:style-name="ce8" office:value-type="currency" office:currency="NZD" office:value="0.0495" calcext:value-type="currency">
            <text:p>$0.0495</text:p>
          </table:table-cell>
          <table:table-cell office:value-type="currency" office:currency="NZD" office:value="0" calcext:value-type="currency">
            <text:p>$0.0000</text:p>
          </table:table-cell>
          <table:table-cell table:formula="of:=SUM([.H$3:.H42])" office:value-type="currency" office:currency="NZD" office:value="18.0182" calcext:value-type="currency">
            <text:p>$18.02</text:p>
          </table:table-cell>
        </table:table-row>
        <table:table-row table:style-name="ro1">
          <table:table-cell office:value-type="string" calcext:value-type="string">
            <text:p>BSP89 N-MOSF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VBsemiElec-BSP89VB/C20755324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NZD" office:value="0.5565" calcext:value-type="currency">
            <text:p>$0.5565</text:p>
          </table:table-cell>
          <table:table-cell table:formula="of:=[.C43]*[.G43]" office:value-type="currency" office:currency="NZD" office:value="0.5565" calcext:value-type="currency">
            <text:p>$0.5565</text:p>
          </table:table-cell>
          <table:table-cell table:formula="of:=SUM([.H$3:.H43])" office:value-type="currency" office:currency="NZD" office:value="18.5747" calcext:value-type="currency">
            <text:p>$18.57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Other</text:p>
          </table:table-cell>
          <table:covered-table-cell table:number-columns-repeated="5"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style-name="ce8" office:value-type="currency" office:currency="NZD" office:value="1.66" calcext:value-type="currency">
            <text:p>$1.6600</text:p>
          </table:table-cell>
          <table:table-cell office:value-type="currency" office:currency="NZD" office:value="8.3" calcext:value-type="currency">
            <text:p>$8.3000</text:p>
          </table:table-cell>
          <table:table-cell table:formula="of:=SUM([.H$3:.H45])" office:value-type="currency" office:currency="NZD" office:value="26.8747" calcext:value-type="currency">
            <text:p>$26.87</text:p>
          </table:table-cell>
        </table:table-row>
        <table:table-row table:style-name="ro1">
          <table:table-cell office:value-type="string" calcext:value-type="string">
            <text:p>Aluminium Plate (100x200x2mm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7160296738.html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NZD" office:value="6.23" calcext:value-type="currency">
            <text:p>$6.2300</text:p>
          </table:table-cell>
          <table:table-cell office:value-type="currency" office:currency="NZD" office:value="6.23" calcext:value-type="currency">
            <text:p>$6.2300</text:p>
          </table:table-cell>
          <table:table-cell table:formula="of:=SUM([.H$3:.H46])" office:value-type="currency" office:currency="NZD" office:value="33.1047" calcext:value-type="currency">
            <text:p>$33.10</text:p>
          </table:table-cell>
        </table:table-row>
        <table:table-row table:style-name="ro1">
          <table:table-cell table:style-name="ce14" office:value-type="string" calcext:value-type="string" table:number-columns-spanned="8" table:number-rows-spanned="1">
            <text:p>Total</text:p>
          </table:table-cell>
          <table:covered-table-cell table:number-columns-repeated="7" table:style-name="ce14"/>
          <table:table-cell table:style-name="ce22" table:formula="of:=SUM([.H$3:.H47])" office:value-type="currency" office:currency="NZD" office:value="33.1047" calcext:value-type="currency">
            <text:p>$33.1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Totals</text:p>
          </table:table-cell>
          <table:table-cell office:value-type="string" calcext:value-type="string">
            <text:p>Money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liexpress, Inc. Shipping + Tax</text:p>
          </table:table-cell>
          <table:table-cell table:style-name="ce10" office:value-type="currency" office:currency="NZD" office:value="24.57" calcext:value-type="currency">
            <text:p>$24.5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LCPCB, Inc. Shipping + Tax</text:p>
          </table:table-cell>
          <table:table-cell table:style-name="ce10" office:value-type="currency" office:currency="NZD" office:value="38.84" calcext:value-type="currency">
            <text:p>$38.8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10" table:formula="of:=SUM([.B50:.B51])" office:value-type="currency" office:currency="NZD" office:value="63.41" calcext:value-type="currency">
            <text:p>$63.41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family-generic="roman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NZ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NZ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NZ">$</number:currency-symbol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NZ">$</number:currency-symbol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0118P0" style:volatile="true" number:language="en" number:country="NZ">
      <number:currency-symbol number:language="en" number:country="NZ">$</number:currency-symbol>
      <number:number number:decimal-places="3" number:min-decimal-places="3" number:min-integer-digits="1" number:grouping="true"/>
    </number:currency-style>
    <number:currency-style style:name="N10118" number:language="en" number:country="NZ">
      <style:text-properties fo:color="#ff0000"/>
      <number:text>-</number:text>
      <number:currency-symbol number:language="en" number:country="NZ">$</number:currency-symbol>
      <number:number number:decimal-places="3" number:min-decimal-places="3" number:min-integer-digits="1" number:grouping="true"/>
      <style:map style:condition="value()&gt;=0" style:apply-style-name="N10118P0"/>
    </number:currency-style>
    <number:currency-style style:name="N10120P0" style:volatile="true" number:language="en" number:country="NZ">
      <number:currency-symbol number:language="en" number:country="NZ">$</number:currency-symbol>
      <number:number number:decimal-places="4" number:min-decimal-places="4" number:min-integer-digits="1" number:grouping="true"/>
    </number:currency-style>
    <number:currency-style style:name="N10120" number:language="en" number:country="NZ">
      <style:text-properties fo:color="#ff0000"/>
      <number:text>-</number:text>
      <number:currency-symbol number:language="en" number:country="NZ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 style:data-style-name="N2" text:time-value="12:47:10.84452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1T19:29:09.219612700</meta:creation-date>
    <meta:generator>LibreOffice/26.2.3.2$Windows_X86_64 LibreOffice_project/70e089b17412e4cb7773e41413306b17a2328c34</meta:generator>
    <dc:date>2026-06-03T13:18:01.424326200</dc:date>
    <meta:editing-duration>PT6H17M19S</meta:editing-duration>
    <meta:editing-cycles>4</meta:editing-cycles>
    <meta:document-statistic meta:table-count="1" meta:cell-count="384" meta:object-count="0"/>
  </office:meta>
</office:document-meta>
</file>