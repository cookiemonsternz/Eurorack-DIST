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1"/>
    </style:style>
    <style:style style:name="ce3" style:family="table-cell" style:parent-style-name="Default">
      <style:text-properties style:font-name="Liberation Serif2"/>
    </style:style>
    <style:style style:name="ce4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6" style:family="table-cell" style:parent-style-name="Default" style:data-style-name="N1011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18">
      <style:table-cell-properties fo:wrap-option="wrap"/>
    </style:style>
    <style:style style:name="ce8" style:family="table-cell" style:parent-style-name="Default" style:data-style-name="N118"/>
    <style:style style:name="ce9" style:family="table-cell" style:parent-style-name="Default" style:data-style-name="N10118"/>
    <style:style style:name="ce10" style:family="table-cell" style:parent-style-name="Default" style:data-style-name="N104"/>
    <style:style style:name="T1" style:family="text">
      <style:text-properties style:font-name="Liberation Serif2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"/>
        <table:table-column table:style-name="co2" table:default-cell-style-name="ce8"/>
        <table:table-column table:style-name="co2" table:default-cell-style-name="ce10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eed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ot / Min Amou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Net</text:p>
          </table:table-cell>
          <table:table-cell table:style-name="Default" office:value-type="string" calcext:value-type="string">
            <text:p>Running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Capacitor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1n Cap, 04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75-0402B102K500NT/C152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7" calcext:value-type="currency">
            <text:p>$0.0017</text:p>
          </table:table-cell>
          <table:table-cell table:formula="of:=[.C3]*[.G3]" office:value-type="currency" office:currency="NZD" office:value="0.0102" calcext:value-type="currency">
            <text:p>$0.0102</text:p>
          </table:table-cell>
          <table:table-cell table:formula="of:=SUM([.H$3:.H3])" office:value-type="currency" office:currency="NZD" office:value="0.0102" calcext:value-type="currency">
            <text:p>$0.01</text:p>
          </table:table-cell>
        </table:table-row>
        <table:table-row table:style-name="ro1">
          <table:table-cell office:value-type="string" calcext:value-type="string">
            <text:p>4.7n Cap, 04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90-0402B472K500NT/C1538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5" calcext:value-type="currency">
            <text:p>$0.0015</text:p>
          </table:table-cell>
          <table:table-cell table:formula="of:=[.C4]*[.G4]" office:value-type="currency" office:currency="NZD" office:value="0.0045" calcext:value-type="currency">
            <text:p>$0.0045</text:p>
          </table:table-cell>
          <table:table-cell table:formula="of:=SUM([.H$3:.H4])" office:value-type="currency" office:currency="NZD" office:value="0.0147" calcext:value-type="currency">
            <text:p>$0.01</text:p>
          </table:table-cell>
        </table:table-row>
        <table:table-row table:style-name="ro1">
          <table:table-cell office:value-type="string" calcext:value-type="string">
            <text:p>10n Cap, 0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5869-CL05B103KB5NNNC/C15195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8" calcext:value-type="currency">
            <text:p>$0.0018</text:p>
          </table:table-cell>
          <table:table-cell table:formula="of:=[.C5]*[.G5]" office:value-type="currency" office:currency="NZD" office:value="0.0036" calcext:value-type="currency">
            <text:p>$0.0036</text:p>
          </table:table-cell>
          <table:table-cell table:formula="of:=SUM([.H$3:.H5])" office:value-type="currency" office:currency="NZD" office:value="0.0183" calcext:value-type="currency">
            <text:p>$0.02</text:p>
          </table:table-cell>
        </table:table-row>
        <table:table-row table:style-name="ro1">
          <table:table-cell office:value-type="string" calcext:value-type="string">
            <text:p>22n Cap, 0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884-0402B223K500NT/C1532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25" calcext:value-type="currency">
            <text:p>$0.0025</text:p>
          </table:table-cell>
          <table:table-cell table:formula="of:=[.C6]*[.G6]" office:value-type="currency" office:currency="NZD" office:value="0.005" calcext:value-type="currency">
            <text:p>$0.0050</text:p>
          </table:table-cell>
          <table:table-cell table:formula="of:=SUM([.H$3:.H6])" office:value-type="currency" office:currency="NZD" office:value="0.0233" calcext:value-type="currency">
            <text:p>$0.02</text:p>
          </table:table-cell>
        </table:table-row>
        <table:table-row table:style-name="ro1">
          <table:table-cell office:value-type="string" calcext:value-type="string">
            <text:p>100n Cap, 040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91005-CL05B104KB54PNC/C307331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67" calcext:value-type="currency">
            <text:p>$0.0067</text:p>
          </table:table-cell>
          <table:table-cell table:formula="of:=[.C7]*[.G7]" office:value-type="currency" office:currency="NZD" office:value="0.1273" calcext:value-type="currency">
            <text:p>$0.1273</text:p>
          </table:table-cell>
          <table:table-cell table:formula="of:=SUM([.H$3:.H7])" office:value-type="currency" office:currency="NZD" office:value="0.1506" calcext:value-type="currency">
            <text:p>$0.15</text:p>
          </table:table-cell>
        </table:table-row>
        <table:table-row table:style-name="ro1">
          <table:table-cell office:value-type="string" calcext:value-type="string">
            <text:p>220n Cap, 040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7456-CL05B224KO5NNNC/C16772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56" calcext:value-type="currency">
            <text:p>$0.0056</text:p>
          </table:table-cell>
          <table:table-cell table:formula="of:=[.C8]*[.G8]" office:value-type="currency" office:currency="NZD" office:value="0.0728" calcext:value-type="currency">
            <text:p>$0.0728</text:p>
          </table:table-cell>
          <table:table-cell table:formula="of:=SUM([.H$3:.H8])" office:value-type="currency" office:currency="NZD" office:value="0.2234" calcext:value-type="currency">
            <text:p>$0.22</text:p>
          </table:table-cell>
        </table:table-row>
        <table:table-row table:style-name="ro1">
          <table:table-cell office:value-type="string" calcext:value-type="string">
            <text:p>1u Cap, 0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53938-CL05A105KA5NQNC/C5292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49" calcext:value-type="currency">
            <text:p>$0.0049</text:p>
          </table:table-cell>
          <table:table-cell table:formula="of:=[.C9]*[.G9]" office:value-type="currency" office:currency="NZD" office:value="0.0049" calcext:value-type="currency">
            <text:p>$0.0049</text:p>
          </table:table-cell>
          <table:table-cell table:formula="of:=SUM([.H$3:.H9])" office:value-type="currency" office:currency="NZD" office:value="0.2283" calcext:value-type="currency">
            <text:p>$0.23</text:p>
          </table:table-cell>
        </table:table-row>
        <table:table-row table:style-name="ro1">
          <table:table-cell office:value-type="string" calcext:value-type="string">
            <text:p>1u Electrolytic Cap, P1.5xD4.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16323.html?spm=wm.fly.bg.2.xh___wm.sy.dhl.mly.12-0-1&amp;lcsc_vid=QgdcVwJXRQJWBFFSFgMKBQVWEgAMVVEFTgQNA1ZXFlkxVlNeR1JeV1RVRlFaVTtW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85" calcext:value-type="currency">
            <text:p>$0.0185</text:p>
          </table:table-cell>
          <table:table-cell table:formula="of:=[.C10]*[.G10]" office:value-type="currency" office:currency="NZD" office:value="0" calcext:value-type="currency">
            <text:p>$0.0000</text:p>
          </table:table-cell>
          <table:table-cell table:formula="of:=SUM([.H$3:.H10])" office:value-type="currency" office:currency="NZD" office:value="0.2283" calcext:value-type="currency">
            <text:p>$0.23</text:p>
          </table:table-cell>
        </table:table-row>
        <table:table-row table:style-name="ro1">
          <table:table-cell office:value-type="string" calcext:value-type="string">
            <text:p>2.2u Electrolytic Cap, P1.5xD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43343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51" calcext:value-type="currency">
            <text:p>$0.0151</text:p>
          </table:table-cell>
          <table:table-cell table:formula="of:=[.C11]*[.G11]" office:value-type="currency" office:currency="NZD" office:value="0" calcext:value-type="currency">
            <text:p>$0.0000</text:p>
          </table:table-cell>
          <table:table-cell table:formula="of:=SUM([.H$3:.H11])" office:value-type="currency" office:currency="NZD" office:value="0.2283" calcext:value-type="currency">
            <text:p>$0.23</text:p>
          </table:table-cell>
        </table:table-row>
        <table:table-row table:style-name="ro1">
          <table:table-cell office:value-type="string" calcext:value-type="string">
            <text:p>4.7u Electrolytic Cap, P1.5xD4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873979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14" calcext:value-type="currency">
            <text:p>$0.0114</text:p>
          </table:table-cell>
          <table:table-cell table:formula="of:=[.C12]*[.G12]" office:value-type="currency" office:currency="NZD" office:value="0" calcext:value-type="currency">
            <text:p>$0.0000</text:p>
          </table:table-cell>
          <table:table-cell table:formula="of:=SUM([.H$3:.H12])" office:value-type="currency" office:currency="NZD" office:value="0.2283" calcext:value-type="currency">
            <text:p>$0.23</text:p>
          </table:table-cell>
        </table:table-row>
        <table:table-row table:style-name="ro1">
          <table:table-cell office:value-type="string" calcext:value-type="string">
            <text:p>10u Electrolytic Cap, P1.5xD4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503219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0143" calcext:value-type="currency">
            <text:p>$0.0143</text:p>
          </table:table-cell>
          <table:table-cell table:formula="of:=[.C13]*[.G13]" office:value-type="currency" office:currency="NZD" office:value="0" calcext:value-type="currency">
            <text:p>$0.0000</text:p>
          </table:table-cell>
          <table:table-cell table:formula="of:=SUM([.H$3:.H13])" office:value-type="currency" office:currency="NZD" office:value="0.2283" calcext:value-type="currency">
            <text:p>$0.23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Resistor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47<text:span text:style-name="T1">Ω Resistor, 0402</text:span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5861-0402WGF470JTCE/C25118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NZD" office:value="0.0008" calcext:value-type="currency">
            <text:p>$0.001</text:p>
          </table:table-cell>
          <table:table-cell table:formula="of:=[.C15]*[.G15]" office:value-type="currency" office:currency="NZD" office:value="0.0016" calcext:value-type="currency">
            <text:p>$0.0016</text:p>
          </table:table-cell>
          <table:table-cell table:formula="of:=SUM([.H$3:.H15])" office:value-type="currency" office:currency="NZD" office:value="0.2299" calcext:value-type="currency">
            <text:p>$0.23</text:p>
          </table:table-cell>
        </table:table-row>
        <table:table-row table:style-name="ro1">
          <table:table-cell table:style-name="ce3" office:value-type="string" calcext:value-type="string">
            <text:p>150Ω Resistor, 0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5825-0402WGF1500TCE/C25082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01" calcext:value-type="currency">
            <text:p>$0.0001</text:p>
          </table:table-cell>
          <table:table-cell table:formula="of:=[.C16]*[.G16]" office:value-type="currency" office:currency="NZD" office:value="0.0002" calcext:value-type="currency">
            <text:p>$0.0002</text:p>
          </table:table-cell>
          <table:table-cell table:formula="of:=SUM([.H$3:.H16])" office:value-type="currency" office:currency="NZD" office:value="0.2301" calcext:value-type="currency">
            <text:p>$0.23</text:p>
          </table:table-cell>
        </table:table-row>
        <table:table-row table:style-name="ro1">
          <table:table-cell table:style-name="ce3" office:value-type="string" calcext:value-type="string">
            <text:p>510Ω Resistor, 04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5866-0402WGF5100TCE/C2512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06" calcext:value-type="currency">
            <text:p>$0.0006</text:p>
          </table:table-cell>
          <table:table-cell table:formula="of:=[.C17]*[.G17]" office:value-type="currency" office:currency="NZD" office:value="0.003" calcext:value-type="currency">
            <text:p>$0.0030</text:p>
          </table:table-cell>
          <table:table-cell table:formula="of:=SUM([.H$3:.H17])" office:value-type="currency" office:currency="NZD" office:value="0.2331" calcext:value-type="currency">
            <text:p>$0.23</text:p>
          </table:table-cell>
        </table:table-row>
        <table:table-row table:style-name="ro1">
          <table:table-cell table:style-name="ce3" office:value-type="string" calcext:value-type="string">
            <text:p>1kΩ Resistor, 040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12256-0402WGF1001TCE/C11702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NZD" office:value="0.0011" calcext:value-type="currency">
            <text:p>$0.0011</text:p>
          </table:table-cell>
          <table:table-cell table:formula="of:=[.C18]*[.G18]" office:value-type="currency" office:currency="NZD" office:value="0.011" calcext:value-type="currency">
            <text:p>$0.0110</text:p>
          </table:table-cell>
          <table:table-cell table:formula="of:=SUM([.H$3:.H18])" office:value-type="currency" office:currency="NZD" office:value="0.2441" calcext:value-type="currency">
            <text:p>$0.24</text:p>
          </table:table-cell>
        </table:table-row>
        <table:table-row table:style-name="ro1">
          <table:table-cell table:style-name="ce3" office:value-type="string" calcext:value-type="string">
            <text:p>1.5kΩ Resistor, 0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610-0402WGF1501TCE/C25867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NZD" office:value="0.0011" calcext:value-type="currency">
            <text:p>$0.0011</text:p>
          </table:table-cell>
          <table:table-cell table:formula="of:=[.C19]*[.G19]" office:value-type="currency" office:currency="NZD" office:value="0.0011" calcext:value-type="currency">
            <text:p>$0.0011</text:p>
          </table:table-cell>
          <table:table-cell table:formula="of:=SUM([.H$3:.H19])" office:value-type="currency" office:currency="NZD" office:value="0.2452" calcext:value-type="currency">
            <text:p>$0.25</text:p>
          </table:table-cell>
        </table:table-row>
        <table:table-row table:style-name="ro1">
          <table:table-cell table:style-name="ce3" office:value-type="string" calcext:value-type="string">
            <text:p>2.2kΩ Resistor, 0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622-0402WGF2201TCE/C25879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08" calcext:value-type="currency">
            <text:p>$0.0008</text:p>
          </table:table-cell>
          <table:table-cell table:formula="of:=[.C20]*[.G20]" office:value-type="currency" office:currency="NZD" office:value="0.0016" calcext:value-type="currency">
            <text:p>$0.0016</text:p>
          </table:table-cell>
          <table:table-cell table:formula="of:=SUM([.H$3:.H20])" office:value-type="currency" office:currency="NZD" office:value="0.2468" calcext:value-type="currency">
            <text:p>$0.25</text:p>
          </table:table-cell>
        </table:table-row>
        <table:table-row table:style-name="ro1">
          <table:table-cell table:style-name="ce3" office:value-type="string" calcext:value-type="string">
            <text:p>4.7kΩ Resistor, 0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643-0402WGF4701TCE/C25900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" calcext:value-type="currency">
            <text:p>$0.0010</text:p>
          </table:table-cell>
          <table:table-cell table:formula="of:=[.C21]*[.G21]" office:value-type="currency" office:currency="NZD" office:value="0.001" calcext:value-type="currency">
            <text:p>$0.0010</text:p>
          </table:table-cell>
          <table:table-cell table:formula="of:=SUM([.H$3:.H21])" office:value-type="currency" office:currency="NZD" office:value="0.2478" calcext:value-type="currency">
            <text:p>$0.25</text:p>
          </table:table-cell>
        </table:table-row>
        <table:table-row table:style-name="ro1">
          <table:table-cell table:style-name="ce3" office:value-type="string" calcext:value-type="string">
            <text:p>6.8kΩ Resistor, 0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660-0402WGF6801TCE/C25917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08" calcext:value-type="currency">
            <text:p>$0.0008</text:p>
          </table:table-cell>
          <table:table-cell table:formula="of:=[.C22]*[.G22]" office:value-type="currency" office:currency="NZD" office:value="0.0008" calcext:value-type="currency">
            <text:p>$0.0008</text:p>
          </table:table-cell>
          <table:table-cell table:formula="of:=SUM([.H$3:.H22])" office:value-type="currency" office:currency="NZD" office:value="0.2486" calcext:value-type="currency">
            <text:p>$0.25</text:p>
          </table:table-cell>
        </table:table-row>
        <table:table-row table:style-name="ro1">
          <table:table-cell table:style-name="ce3" office:value-type="string" calcext:value-type="string">
            <text:p>10kΩ Resistor, 040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487-0402WGF1002TCE/C25744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0013" calcext:value-type="currency">
            <text:p>$0.0013</text:p>
          </table:table-cell>
          <table:table-cell table:formula="of:=[.C23]*[.G23]" office:value-type="currency" office:currency="NZD" office:value="0.013" calcext:value-type="currency">
            <text:p>$0.0130</text:p>
          </table:table-cell>
          <table:table-cell table:formula="of:=SUM([.H$3:.H23])" office:value-type="currency" office:currency="NZD" office:value="0.2616" calcext:value-type="currency">
            <text:p>$0.26</text:p>
          </table:table-cell>
        </table:table-row>
        <table:table-row table:style-name="ro1">
          <table:table-cell table:style-name="ce3" office:value-type="string" calcext:value-type="string">
            <text:p>22kΩ Resistor, 0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511-0402WGF2202TCE/C25768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001" calcext:value-type="currency">
            <text:p>$0.0010</text:p>
          </table:table-cell>
          <table:table-cell table:formula="of:=[.C24]*[.G24]" office:value-type="currency" office:currency="NZD" office:value="0.002" calcext:value-type="currency">
            <text:p>$0.0020</text:p>
          </table:table-cell>
          <table:table-cell table:formula="of:=SUM([.H$3:.H24])" office:value-type="currency" office:currency="NZD" office:value="0.2636" calcext:value-type="currency">
            <text:p>$0.26</text:p>
          </table:table-cell>
        </table:table-row>
        <table:table-row table:style-name="ro1">
          <table:table-cell table:style-name="ce3" office:value-type="string" calcext:value-type="string">
            <text:p>39kΩ Resistor, 04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526-0402WGF3902TCE/C2578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08" calcext:value-type="currency">
            <text:p>$0.0008</text:p>
          </table:table-cell>
          <table:table-cell table:formula="of:=[.C25]*[.G25]" office:value-type="currency" office:currency="NZD" office:value="0.0032" calcext:value-type="currency">
            <text:p>$0.0032</text:p>
          </table:table-cell>
          <table:table-cell table:formula="of:=SUM([.H$3:.H25])" office:value-type="currency" office:currency="NZD" office:value="0.2668" calcext:value-type="currency">
            <text:p>$0.27</text:p>
          </table:table-cell>
        </table:table-row>
        <table:table-row table:style-name="ro1">
          <table:table-cell table:style-name="ce3" office:value-type="string" calcext:value-type="string">
            <text:p>100kΩ Resistor, 040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484-0402WGF1003TCE/C25741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09" calcext:value-type="currency">
            <text:p>$0.0009</text:p>
          </table:table-cell>
          <table:table-cell table:formula="of:=[.C26]*[.G26]" office:value-type="currency" office:currency="NZD" office:value="0.0117" calcext:value-type="currency">
            <text:p>$0.0117</text:p>
          </table:table-cell>
          <table:table-cell table:formula="of:=SUM([.H$3:.H26])" office:value-type="currency" office:currency="NZD" office:value="0.2785" calcext:value-type="currency">
            <text:p>$0.28</text:p>
          </table:table-cell>
        </table:table-row>
        <table:table-row table:style-name="ro1">
          <table:table-cell table:style-name="ce3" office:value-type="string" calcext:value-type="string">
            <text:p>150kΩ Resistor, 0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498-0402WGF1503TCE/C25755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07" calcext:value-type="currency">
            <text:p>$0.0007</text:p>
          </table:table-cell>
          <table:table-cell table:formula="of:=[.C27]*[.G27]" office:value-type="currency" office:currency="NZD" office:value="0.0007" calcext:value-type="currency">
            <text:p>$0.0007</text:p>
          </table:table-cell>
          <table:table-cell table:formula="of:=SUM([.H$3:.H27])" office:value-type="currency" office:currency="NZD" office:value="0.2792" calcext:value-type="currency">
            <text:p>$0.28</text:p>
          </table:table-cell>
        </table:table-row>
        <table:table-row table:style-name="ro1">
          <table:table-cell table:style-name="ce3" office:value-type="string" calcext:value-type="string">
            <text:p>200kΩ Resistor, 04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507-0402WGF2003TCE/C25764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" calcext:value-type="currency">
            <text:p>$0.0010</text:p>
          </table:table-cell>
          <table:table-cell table:formula="of:=[.C28]*[.G28]" office:value-type="currency" office:currency="NZD" office:value="0.004" calcext:value-type="currency">
            <text:p>$0.0040</text:p>
          </table:table-cell>
          <table:table-cell table:formula="of:=SUM([.H$3:.H28])" office:value-type="currency" office:currency="NZD" office:value="0.2832" calcext:value-type="currency">
            <text:p>$0.28</text:p>
          </table:table-cell>
        </table:table-row>
        <table:table-row table:style-name="ro1">
          <table:table-cell table:style-name="ce3" office:value-type="string" calcext:value-type="string">
            <text:p>220kΩ Resistor, 0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510-0402WGF2203TCE/C25767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07" calcext:value-type="currency">
            <text:p>$0.0007</text:p>
          </table:table-cell>
          <table:table-cell table:formula="of:=[.C29]*[.G29]" office:value-type="currency" office:currency="NZD" office:value="0.0014" calcext:value-type="currency">
            <text:p>$0.0014</text:p>
          </table:table-cell>
          <table:table-cell table:formula="of:=SUM([.H$3:.H29])" office:value-type="currency" office:currency="NZD" office:value="0.2846" calcext:value-type="currency">
            <text:p>$0.28</text:p>
          </table:table-cell>
        </table:table-row>
        <table:table-row table:style-name="ro1">
          <table:table-cell table:style-name="ce3" office:value-type="string" calcext:value-type="string">
            <text:p>470kΩ Resistor, 04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533-0402WGF4703TCE/C25790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07" calcext:value-type="currency">
            <text:p>$0.0007</text:p>
          </table:table-cell>
          <table:table-cell table:formula="of:=[.C30]*[.G30]" office:value-type="currency" office:currency="NZD" office:value="0.0021" calcext:value-type="currency">
            <text:p>$0.0021</text:p>
          </table:table-cell>
          <table:table-cell table:formula="of:=SUM([.H$3:.H30])" office:value-type="currency" office:currency="NZD" office:value="0.2867" calcext:value-type="currency">
            <text:p>$0.29</text:p>
          </table:table-cell>
        </table:table-row>
        <table:table-row table:style-name="ro1">
          <table:table-cell table:style-name="ce3" office:value-type="string" calcext:value-type="string">
            <text:p>1MΩ Resistor, 0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6826-0402WGF1004TCE/C26083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1" calcext:value-type="currency">
            <text:p>$0.0010</text:p>
          </table:table-cell>
          <table:table-cell table:formula="of:=[.C31]*[.G31]" office:value-type="currency" office:currency="NZD" office:value="0.002" calcext:value-type="currency">
            <text:p>$0.0020</text:p>
          </table:table-cell>
          <table:table-cell table:formula="of:=SUM([.H$3:.H31])" office:value-type="currency" office:currency="NZD" office:value="0.2887" calcext:value-type="currency">
            <text:p>$0.29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Diodes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1N4148WS, SOD-3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2485-1N4148WS/C2128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0092" calcext:value-type="currency">
            <text:p>$0.0092</text:p>
          </table:table-cell>
          <table:table-cell table:formula="of:=[.C33]*[.G33]" office:value-type="currency" office:currency="NZD" office:value="0.1104" calcext:value-type="currency">
            <text:p>$0.1104</text:p>
          </table:table-cell>
          <table:table-cell table:formula="of:=SUM([.H$3:.H33])" office:value-type="currency" office:currency="NZD" office:value="0.3991" calcext:value-type="currency">
            <text:p>$0.40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Other</text:p>
          </table:table-cell>
          <table:covered-table-cell table:number-columns-repeated="5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TL072CD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partdetail/STMicroelectronics-TL072CDT/C6961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NZD" office:value="0.157" calcext:value-type="currency">
            <text:p>$0.1570</text:p>
          </table:table-cell>
          <table:table-cell table:formula="of:=[.C35]*[.G35]" office:value-type="currency" office:currency="NZD" office:value="1.099" calcext:value-type="currency">
            <text:p>$1.0990</text:p>
          </table:table-cell>
          <table:table-cell table:formula="of:=SUM([.H$3:.H35])" office:value-type="currency" office:currency="NZD" office:value="1.4981" calcext:value-type="currency">
            <text:p>$1.50</text:p>
          </table:table-cell>
        </table:table-row>
        <table:table-row table:style-name="ro1">
          <table:table-cell office:value-type="string" calcext:value-type="string">
            <text:p>100kΩ Potentiometer, ‘RK09K’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278123055.html</text:p>
          </table:table-cell>
          <table:table-cell office:value-type="float" office:value="5" calcext:value-type="float">
            <text:p>5</text:p>
          </table:table-cell>
          <table:table-cell table:style-name="ce8" table:formula="of:=1.04/5" office:value-type="currency" office:currency="NZD" office:value="0.208" calcext:value-type="currency">
            <text:p>$0.2080</text:p>
          </table:table-cell>
          <table:table-cell office:value-type="currency" office:currency="NZD" office:value="3.12" calcext:value-type="currency">
            <text:p>$3.1200</text:p>
          </table:table-cell>
          <table:table-cell table:formula="of:=SUM([.H$3:.H36])" office:value-type="currency" office:currency="NZD" office:value="4.6181" calcext:value-type="currency">
            <text:p>$4.62</text:p>
          </table:table-cell>
        </table:table-row>
        <table:table-row table:style-name="ro1">
          <table:table-cell office:value-type="string" calcext:value-type="string">
            <text:p>SPDT Swit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5370002265.html</text:p>
          </table:table-cell>
          <table:table-cell office:value-type="float" office:value="5" calcext:value-type="float">
            <text:p>5</text:p>
          </table:table-cell>
          <table:table-cell table:style-name="ce9" table:formula="of:=4.26/5" office:value-type="currency" office:currency="NZD" office:value="0.852" calcext:value-type="currency">
            <text:p>$0.8520</text:p>
          </table:table-cell>
          <table:table-cell office:value-type="currency" office:currency="NZD" office:value="4.26" calcext:value-type="currency">
            <text:p>$4.2600</text:p>
          </table:table-cell>
          <table:table-cell table:formula="of:=SUM([.H$3:.H37])" office:value-type="currency" office:currency="NZD" office:value="8.8781" calcext:value-type="currency">
            <text:p>$8.88</text:p>
          </table:table-cell>
        </table:table-row>
        <table:table-row table:style-name="ro1">
          <table:table-cell office:value-type="string" calcext:value-type="string">
            <text:p>PJ301M-12 Audio Ja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4864182675.html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NZD" office:value="0.444" calcext:value-type="currency">
            <text:p>$0.4440</text:p>
          </table:table-cell>
          <table:table-cell office:value-type="currency" office:currency="NZD" office:value="4.4" calcext:value-type="currency">
            <text:p>$4.4000</text:p>
          </table:table-cell>
          <table:table-cell table:formula="of:=SUM([.H$3:.H38])" office:value-type="currency" office:currency="NZD" office:value="13.2781" calcext:value-type="currency">
            <text:p>$13.28</text:p>
          </table:table-cell>
        </table:table-row>
        <table:table-row table:style-name="ro1">
          <table:table-cell office:value-type="string" calcext:value-type="string">
            <text:p>2x08 IDC Conne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430313.html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NZD" office:value="0.0993" calcext:value-type="currency">
            <text:p>$0.0993</text:p>
          </table:table-cell>
          <table:table-cell table:formula="of:=[.C39]*[.G39]" office:value-type="currency" office:currency="NZD" office:value="0" calcext:value-type="currency">
            <text:p>$0.0000</text:p>
          </table:table-cell>
          <table:table-cell table:formula="of:=SUM([.H$3:.H39])" office:value-type="currency" office:currency="NZD" office:value="13.2781" calcext:value-type="currency">
            <text:p>$13.28</text:p>
          </table:table-cell>
        </table:table-row>
        <table:table-row table:style-name="ro1" table:number-rows-repeated="8">
          <table:table-cell table:number-columns-repeated="6"/>
          <table:table-cell table:style-name="Default" table:number-columns-repeated="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currency-symbol number:language="en" number:country="NZ">$</number:currency-symbol>
      <number:number number:decimal-places="3" number:min-decimal-places="3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NZ">$</number:currency-symbol>
      <number:number number:decimal-places="3" number:min-decimal-places="3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NZ">$</number:currency-symbol>
      <number:number number:decimal-places="4" number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NZ">$</number:currency-symbol>
      <number:number number:decimal-places="4" number:min-decimal-places="4" number:min-integer-digits="1" number:grouping="true"/>
      <style:map style:condition="value()&gt;=0" style:apply-style-name="N118P0"/>
    </number:currency-style>
    <number:currency-style style:name="N10117P0" style:volatile="true" number:language="en" number:country="NZ">
      <number:currency-symbol number:language="en" number:country="NZ">$</number:currency-symbol>
      <number:number number:decimal-places="3" number:min-decimal-places="3" number:min-integer-digits="1" number:grouping="true"/>
    </number:currency-style>
    <number:currency-style style:name="N10117" number:language="en" number:country="NZ">
      <style:text-properties fo:color="#ff0000"/>
      <number:text>-</number:text>
      <number:currency-symbol number:language="en" number:country="NZ">$</number:currency-symbol>
      <number:number number:decimal-places="3" number:min-decimal-places="3" number:min-integer-digits="1" number:grouping="true"/>
      <style:map style:condition="value()&gt;=0" style:apply-style-name="N10117P0"/>
    </number:currency-style>
    <number:currency-style style:name="N10118P0" style:volatile="true" number:language="en" number:country="NZ">
      <number:currency-symbol number:language="en" number:country="NZ">$</number:currency-symbol>
      <number:number number:decimal-places="4" number:min-decimal-places="4" number:min-integer-digits="1" number:grouping="true"/>
    </number:currency-style>
    <number:currency-style style:name="N10118" number:language="en" number:country="NZ">
      <style:text-properties fo:color="#ff0000"/>
      <number:text>-</number:text>
      <number:currency-symbol number:language="en" number:country="NZ">$</number:currency-symbol>
      <number:number number:decimal-places="4" number:min-decimal-places="4" number:min-integer-digits="1" number:grouping="true"/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9:29:09.219612700</meta:creation-date>
    <meta:generator>LibreOffice/26.2.3.2$Windows_X86_64 LibreOffice_project/70e089b17412e4cb7773e41413306b17a2328c34</meta:generator>
    <dc:date>2026-06-01T20:44:53.983015400</dc:date>
    <meta:editing-duration>PT9M33S</meta:editing-duration>
    <meta:editing-cycles>1</meta:editing-cycles>
    <meta:document-statistic meta:table-count="1" meta:cell-count="319" meta:object-count="0"/>
  </office:meta>
</office:document-meta>
</file>